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333in" table:align="left"/>
    </style:style>
    <style:style style:name="Table1.A" style:family="table-column">
      <style:table-column-properties style:column-width="2.0639in"/>
    </style:style>
    <style:style style:name="Table1.B" style:family="table-column">
      <style:table-column-properties style:column-width="3.869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weight="bold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ext_20_body">
      <style:paragraph-properties fo:margin-left="0.1563in" fo:margin-right="0in" fo:margin-top="0in" fo:margin-bottom="0.052in" style:contextual-spacing="false" fo:text-indent="0in" style:auto-text-indent="false"/>
    </style:style>
    <style:style style:name="P6" style:family="paragraph" style:parent-style-name="Text_20_body">
      <style:paragraph-properties fo:margin-left="0.1563in" fo:margin-right="0in" fo:margin-top="0in" fo:margin-bottom="0.052in" style:contextual-spacing="false" fo:text-indent="0in" style:auto-text-indent="false"/>
      <style:text-properties fo:font-weight="bold"/>
    </style:style>
    <style:style style:name="P7" style:family="paragraph" style:parent-style-name="Text_20_body">
      <style:paragraph-properties fo:margin-left="0.3646in" fo:margin-right="0in" fo:margin-top="0in" fo:margin-bottom="0.0417in" style:contextual-spacing="false" fo:text-indent="0in" style:auto-text-indent="false"/>
    </style:style>
    <style:style style:name="P8" style:family="paragraph" style:parent-style-name="Text_20_body">
      <style:paragraph-properties fo:margin-left="0.1563in" fo:margin-right="0.1252in" fo:margin-top="0.1252in" fo:margin-bottom="0.1252in" style:contextual-spacing="false" fo:text-indent="0in" style:auto-text-indent="false"/>
      <style:text-properties fo:color="#444444" loext:opacity="100%" fo:font-size="11pt" fo:font-weight="bold" fo:background-color="#f8f9fa" loext:padding-left="0.1252in" loext:padding-right="0in" loext:padding-top="0.0835in" loext:padding-bottom="0.0835in" loext:border-left="0.06pt solid #e9ecef" loext:border-right="none" loext:border-top="0.06pt solid #e9ecef" loext:border-bottom="0.06pt solid #e9ecef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EARCH METHODOLOGY SUMMARY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OJECT:</text:p>
          </table:table-cell>
          <table:table-cell table:style-name="Table1.A1" office:value-type="string">
            <text:p text:style-name="P3">Help-Seeking Behavior &amp; Support Systems (ULS, Inc.)</text:p>
          </table:table-cell>
        </table:table-row>
        <table:table-row>
          <table:table-cell table:style-name="Table1.A1" office:value-type="string">
            <text:p text:style-name="P4">LOCALE:</text:p>
          </table:table-cell>
          <table:table-cell table:style-name="Table1.A1" office:value-type="string">
            <text:p text:style-name="P3">University of La Salette, Inc., Santiago City</text:p>
          </table:table-cell>
        </table:table-row>
        <table:table-row>
          <table:table-cell table:style-name="Table1.A1" office:value-type="string">
            <text:p text:style-name="P4">TIMEFRAME:</text:p>
          </table:table-cell>
          <table:table-cell table:style-name="Table1.A1" office:value-type="string">
            <text:p text:style-name="Table_20_Contents">AY 2025-2026, 2nd Semester</text:p>
          </table:table-cell>
        </table:table-row>
      </table:table>
      <text:h text:style-name="Heading_20_2" text:outline-level="2">1. RESEARCH DESIGN &amp; LOCALE</text:h>
      <text:p text:style-name="P5"><text:span text:style-name="T1">Design Type :</text:span> Quantitative Descriptive-Correlational</text:p>
      <text:p text:style-name="P5"><text:span text:style-name="T1">Study Site :</text:span> University of La Salette, Inc. (ULS) main campus</text:p>
      <text:h text:style-name="Heading_20_2" text:outline-level="2">2. PARTICIPANTS &amp; SAMPLING</text:h>
      <text:p text:style-name="P5"><text:span text:style-name="T1">Population (N) :</text:span> 5,821 undergraduate students</text:p>
      <text:p text:style-name="P5"><text:span text:style-name="T1">Sample Size (n) :</text:span> 361 respondents (determined via Raosoft calculator)</text:p>
      <text:p text:style-name="P5"><text:span text:style-name="T1">Sampling Method :</text:span> Proportional Stratified Random Sampling</text:p>
      <text:p text:style-name="P6">Year Level Distribution:</text:p>
      <text:p text:style-name="P7">Freshmen : 102 respondents (28.3%)</text:p>
      <text:p text:style-name="P7">Sophomores : 99 respondents (27.4%)</text:p>
      <text:p text:style-name="P7">Juniors : 160 respondents (44.3%)</text:p>
      <text:p text:style-name="P5">Note: Seniors were excluded due to off-campus internship/clinical schedules.</text:p>
      <text:h text:style-name="Heading_20_2" text:outline-level="2">3. RESEARCH INSTRUMENT</text:h>
      <text:p text:style-name="P5"><text:span text:style-name="T1">Structure:</text:span> Two-part Survey Questionnaire</text:p>
      <text:p text:style-name="P7"><text:span text:style-name="T1">Part I :</text:span> Demographic Profile (Age, Sex, Year Level, Department)</text:p>
      <text:p text:style-name="P7"><text:span text:style-name="T1">Part II :</text:span> Help-Seeking Behavior &amp; 5 support units (Faculty, HDC, DSS, POD, OSSA)</text:p>
      <text:p text:style-name="P5"><text:span text:style-name="T1">Measurement Scale:</text:span> 5-Point Likert Scale (1-Never, 2-Rarely, 3-Sometimes, 4-Often, 5-Always)</text:p>
      <text:p text:style-name="P5"><text:span text:style-name="T1">Reliability Index:</text:span> Pilot testing Cronbach's Alpha = 0.953 (Excellent consistency)</text:p>
      <text:h text:style-name="Heading_20_2" text:outline-level="2">4. OPERATIONAL FLOW</text:h>
      <text:p text:style-name="P8">Approval ──&gt; Validation ──&gt; Pilot Test ──&gt; Survey ──&gt; Data Encoding</text:p>
      <text:p text:style-name="P5"><text:span text:style-name="T1">Approval :</text:span> Institutional permissions secured from President &amp; College Deans.</text:p>
      <text:p text:style-name="P5"><text:span text:style-name="T1">Validation :</text:span> Vetted by academic experts for relevance, clarity, and formatting.</text:p>
      <text:p text:style-name="P5"><text:span text:style-name="T1">Pilot Test :</text:span> Pre-tested on a small representative cohort to verify reliability.</text:p>
      <text:p text:style-name="P5"><text:span text:style-name="T1">Survey :</text:span> Personally distributed face-to-face; retrieved within 3–5 minutes.</text:p>
      <text:p text:style-name="P5"><text:span text:style-name="T1">Data Encoding :</text:span> Checked for completion and compiled into Microsoft Excel.</text:p>
      <text:h text:style-name="Heading_20_2" text:outline-level="2">5. ETHICAL PROTOCOLS</text:h>
      <text:p text:style-name="P5"><text:span text:style-name="T1">Core Pillars :</text:span> Beneficence, Non-Maleficence, Justice, Respect for Persons.</text:p>
      <text:p text:style-name="P5"><text:span text:style-name="T1">Authorization:</text:span> Reviewed and approved by the Research Adviser prior to gathering.</text:p>
      <text:p text:style-name="P5"><text:span text:style-name="T1">Privacy :</text:span> Voluntary participation, optional anonymity, &amp; encrypted database.</text:p>
      <text:h text:style-name="Heading_20_2" text:outline-level="2">6. STATISTICAL TREATMENT</text:h>
      <text:p text:style-name="P5"><text:span text:style-name="T1">Normality Vetting :</text:span> Shapiro-Wilk Test (p &lt; 0.05) ──&gt; Confirmed non-normal dataset.</text:p>
      <text:p text:style-name="P5"><text:span text:style-name="T1">Statistical Path :</text:span> Nonparametric tests utilized for inferential analysis.</text:p>
      <text:p text:style-name="P6">Applied Tools :</text:p>
      <text:p text:style-name="P7"><text:span text:style-name="T1">Demographic Profile :</text:span> Frequency Counts &amp; Percentages</text:p>
      <text:p text:style-name="P7"><text:span text:style-name="T1">Behavior/Usage Levels:</text:span> Mean &amp; Standard Deviation (SD)</text:p>
      <text:p text:style-name="P7"><text:span text:style-name="T1">Gender Differences :</text:span> Mann-Whitney U Test</text:p>
      <text:p text:style-name="P7"><text:span text:style-name="T1">Year/Dept Differences:</text:span> Kruskal-Wallis H Test</text:p>
      <text:p text:style-name="P7"><text:span text:style-name="T1">Core Relationship :</text:span> Spearman’s rho correlation coefficient (sig. at 0.0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50%"/>
      <style:text-properties fo:color="#333333" loext:opacity="100%" style:font-name="Liberation Sans1" fo:font-family="'Liberation Sans', Arial, sans-serif" fo:font-size="11pt" style:font-name-asian="Liberation Sans1" style:font-family-asian="'Liberation Sans', Arial, sans-serif" style:font-size-asian="11pt" style:font-name-complex="Liberation Sans1" style:font-family-complex="'Liberation Sans', Arial, sans-serif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2083in" style:contextual-spacing="false" fo:text-align="center" style:justify-single-word="false"/>
      <style:text-properties fo:color="#111111" loext:opacity="100%"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2083in" fo:margin-bottom="0.0835in" style:contextual-spacing="false" fo:padding-left="0in" fo:padding-right="0in" fo:padding-top="0in" fo:padding-bottom="0.0311in" fo:border-left="none" fo:border-right="none" fo:border-top="none" fo:border-bottom="0.06pt solid #dddddd"/>
      <style:text-properties fo:color="#222222" loext:opacity="100%"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image-count="0" meta:object-count="0" meta:page-count="1" meta:paragraph-count="45" meta:word-count="312" meta:character-count="2265" meta:non-whitespace-character-count="1999"/>
    <meta:generator>LibreOffice/26.2.4.2$Linux_X86_64 LibreOffice_project/3346a99e6b841765b75a9b29714a5b95c6761ce3</meta:generator>
    <meta:user-defined meta:name=""/>
  </office:meta>
</office:document-meta>
</file>