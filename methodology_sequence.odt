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left="0.0835in" fo:margin-right="0.0835in" fo:margin-top="0in" fo:margin-bottom="0in" style:contextual-spacing="false" fo:text-indent="0in" style:auto-text-indent="false" style:page-number="auto"/>
      <style:text-properties fo:color="#2563eb" loext:opacity="100%" fo:font-weight="bold" fo:background-color="#f8fafc" loext:padding-left="0.1563in" loext:padding-right="0in" loext:padding-top="0.1563in" loext:padding-bottom="0.1563in" loext:border-left="0.06pt solid #cbd5e1" loext:border-right="none" loext:border-top="0.06pt solid #cbd5e1" loext:border-bottom="0.06pt solid #cbd5e1"/>
    </style:style>
    <style:style style:name="T1" style:family="text">
      <style:text-properties fo:color="#64748b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-Design <text:span text:style-name="T1">➔</text:span> Respondents <text:span text:style-name="T1">➔</text:span> Locale <text:span text:style-name="T1">➔</text:span> Tools <text:span text:style-name="T1">➔</text:span> Collection <text:span text:style-name="T1">➔</text:span> Analysi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1.5in" fo:margin-top="1.5in" fo:margin-bottom="1.5in" style:contextual-spacing="false" fo:line-height="200%" fo:text-align="center" style:justify-single-word="false"/>
      <style:text-properties fo:color="#1e293b" loext:opacity="100%" style:font-name="Liberation Sans1" fo:font-family="'Liberation Sans', Arial, sans-serif" fo:font-size="14pt" style:font-name-asian="Liberation Sans1" style:font-family-asian="'Liberation Sans', Arial, sans-serif" style:font-size-asian="14pt" style:font-name-complex="Liberation Sans1" style:font-family-complex="'Liberation Sans', Arial, sans-serif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1" meta:word-count="11" meta:character-count="71" meta:non-whitespace-character-count="60"/>
    <meta:generator>LibreOffice/26.2.4.2$Linux_X86_64 LibreOffice_project/3346a99e6b841765b75a9b29714a5b95c6761ce3</meta:generator>
    <meta:user-defined meta:name=""/>
  </office:meta>
</office:document-meta>
</file>